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E6E6E6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FFCC"/>
    </style:style>
    <style:style style:name="ce5" style:family="table-cell" style:parent-style-name="Default" style:data-style-name="N0">
      <style:table-cell-properties fo:border="thin solid #000000" style:vertical-align="automatic" fo:background-color="#FFFFCC" style:repeat-content="false"/>
      <style:paragraph-properties fo:text-align="center"/>
    </style:style>
    <style:style style:name="ce6" style:family="table-cell" style:parent-style-name="Default" style:data-style-name="N36">
      <style:table-cell-properties fo:border="thin solid #000000" fo:background-color="#FFFFCC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CC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CC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30729166666667cm" style:use-optimal-column-width="true"/>
    </style:style>
    <style:style style:name="co3" style:family="table-column">
      <style:table-column-properties fo:break-before="auto" style:column-width="9.525cm"/>
    </style:style>
    <style:style style:name="co4" style:family="table-column">
      <style:table-column-properties fo:break-before="auto" style:column-width="2.51354166666667cm" style:use-optimal-column-width="true"/>
    </style:style>
    <style:style style:name="co5" style:family="table-column">
      <style:table-column-properties fo:break-before="auto" style:column-width="2.778125cm" style:use-optimal-column-width="true"/>
    </style:style>
    <style:style style:name="co6" style:family="table-column">
      <style:table-column-properties fo:break-before="auto" style:column-width="5.55625cm"/>
    </style:style>
    <style:style style:name="co7" style:family="table-column">
      <style:table-column-properties fo:break-before="auto" style:column-width="2.38125cm"/>
    </style:style>
    <style:style style:name="co8" style:family="table-column">
      <style:table-column-properties fo:break-before="auto" style:column-width="3.59833333333333cm"/>
    </style:style>
    <style:style style:name="co9" style:family="table-column">
      <style:table-column-properties fo:break-before="auto" style:column-width="3.571875cm"/>
    </style:style>
    <style:style style:name="co10" style:family="table-column">
      <style:table-column-properties fo:break-before="auto" style:column-width="4.7625cm" style:use-optimal-column-width="true"/>
    </style:style>
    <style:style style:name="co11" style:family="table-column">
      <style:table-column-properties fo:break-before="auto" style:column-width="4.92125cm" style:use-optimal-column-width="true"/>
    </style:style>
    <style:style style:name="co12" style:family="table-column">
      <style:table-column-properties fo:break-before="auto" style:column-width="4.23333333333333cm" style:use-optimal-column-width="true"/>
    </style:style>
    <style:style style:name="co13" style:family="table-column">
      <style:table-column-properties fo:break-before="auto" style:column-width="3.36020833333333cm"/>
    </style:style>
    <style:style style:name="co14" style:family="table-column">
      <style:table-column-properties fo:break-before="auto" style:column-width="5.6885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Actualizar&quot;;&quot;Crear&quot;;&quot;Suprimir&quot;)">
          <table:help-message/>
          <table:error-message table:display="true"/>
        </table:content-validation>
        <table:content-validation table:name="val2" table:condition="of:cell-content-is-in-list(&quot;Por artículo&quot;;&quot;Por proveedor&quot;)">
          <table:help-message/>
          <table:error-message table:display="true"/>
        </table:content-validation>
        <table:content-validation table:name="val3" table:condition="of:cell-content-is-in-list(&quot;Aprobado&quot;;&quot;Cancelado&quot;;&quot;Enviado&quot;;&quot;Extraído&quot;;&quot;Hoja de trabajo&quot;;&quot;Rechazado&quot;;&quot;Suprimido&quot;)">
          <table:help-message/>
          <table:error-message table:display="true"/>
        </table:content-validation>
        <table:content-validation table:name="val4" table:condition="of:cell-content-is-in-list(&quot;Actualizar&quot;;&quot;Crear&quot;;&quot;Suprimir&quot;)">
          <table:help-message/>
          <table:error-message table:display="true"/>
        </table:content-validation>
        <table:content-validation table:name="val5" table:condition="of:cell-content-is-in-list(&quot;Cambio en importe&quot;;&quot;Cambio en porcentaje&quot;;&quot;Costo fijo&quot;)">
          <table:help-message/>
          <table:error-message table:display="true"/>
        </table:content-validation>
        <table:content-validation table:name="val6" table:condition="of:cell-content-is-in-list(&quot;No&quot;;&quot;Sí&quot;)">
          <table:help-message/>
          <table:error-message table:display="true"/>
        </table:content-validation>
        <table:content-validation table:name="val7" table:condition="of:cell-content-is-in-list(&quot;Almacén&quot;;&quot;Tienda&quot;)">
          <table:help-message/>
          <table:error-message table:display="true"/>
        </table:content-validation>
        <table:content-validation table:name="val8" table:condition="of:cell-content-is-in-list(&quot;No&quot;;&quot;Sí&quot;)">
          <table:help-message/>
          <table:error-message table:display="true"/>
        </table:content-validation>
        <table:content-validation table:name="val9" table:condition="of:cell-content-is-in-list(&quot;Actualizar&quot;;&quot;Crear&quot;;&quot;Suprimir&quot;)">
          <table:help-message/>
          <table:error-message table:display="true"/>
        </table:content-validation>
        <table:content-validation table:name="val10" table:condition="of:cell-content-is-in-list(&quot;Cambio en importe&quot;;&quot;Cambio en porcentaje&quot;;&quot;Costo fijo&quot;)">
          <table:help-message/>
          <table:error-message table:display="true"/>
        </table:content-validation>
      </table:content-validations>
      <table:table table:name="Cambios_de_cos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7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2">
            <text:p>Acción</text:p>
          </table:table-cell>
          <table:table-cell office:value-type="string" table:style-name="ce2">
            <text:p>Cambio de costo</text:p>
          </table:table-cell>
          <table:table-cell office:value-type="string" table:style-name="ce2">
            <text:p>Descripción de cambio de costo</text:p>
          </table:table-cell>
          <table:table-cell office:value-type="string" table:style-name="ce3">
            <text:p>Motivo</text:p>
          </table:table-cell>
          <table:table-cell office:value-type="string" table:style-name="ce2">
            <text:p>Fecha activa</text:p>
          </table:table-cell>
          <table:table-cell office:value-type="string" table:style-name="ce2">
            <text:p>Estado</text:p>
          </table:table-cell>
          <table:table-cell office:value-type="string" table:style-name="ce2">
            <text:p>Origen de cambio de costo</text:p>
          </table:table-cell>
          <table:table-cell table:number-columns-repeated="16377"/>
        </table:table-row>
        <table:table-row table:style-name="ro2">
          <table:table-cell office:value-type="string" table:content-validation-name="val1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string" table:style-name="ce4">
            <text:p>mariela</text:p>
          </table:table-cell>
          <table:table-cell office:value-type="float" office:value="10" table:style-name="ce5">
            <text:p>10</text:p>
          </table:table-cell>
          <table:table-cell office:value-type="date" office:date-value="2025-02-13T00:00:00" table:style-name="ce6">
            <text:p>13-feb-25</text:p>
          </table:table-cell>
          <table:table-cell office:value-type="string" table:content-validation-name="val3" table:style-name="ce4">
            <text:p>Hoja de trabajo</text:p>
          </table:table-cell>
          <table:table-cell office:value-type="string" table:content-validation-name="val2" table:style-name="ce4">
            <text:p>Por artículo</text:p>
          </table:table-cell>
          <table:table-cell table:number-columns-repeated="16377"/>
        </table:table-row>
        <table:table-row table:number-rows-repeated="1000" table:style-name="ro2">
          <table:table-cell table:content-validation-name="val1" table:style-name="ce4"/>
          <table:table-cell table:number-columns-repeated="2" table:style-name="ce4"/>
          <table:table-cell table:style-name="ce5"/>
          <table:table-cell table:style-name="ce4"/>
          <table:table-cell table:content-validation-name="val3" table:style-name="ce4"/>
          <table:table-cell table:content-validation-name="val2" table:style-name="ce4"/>
          <table:table-cell table:number-columns-repeated="16377"/>
        </table:table-row>
        <table:table-row table:number-rows-repeated="1047574" table:style-name="ro3">
          <table:table-cell table:number-columns-repeated="16384"/>
        </table:table-row>
      </table:table>
      <table:table table:name="Artículos_de_cambio_de_costo" table:style-name="ta1">
        <table:table-column table:style-name="co1" table:number-columns-repeated="9" table:default-cell-style-name="ce1"/>
        <table:table-column table:style-name="co7" table:number-columns-repeated="16375" table:default-cell-style-name="ce1"/>
        <table:table-row table:style-name="ro1">
          <table:table-cell office:value-type="string" table:style-name="ce2">
            <text:p>Acción</text:p>
          </table:table-cell>
          <table:table-cell office:value-type="string" table:style-name="ce2">
            <text:p>Cambio de costo</text:p>
          </table:table-cell>
          <table:table-cell office:value-type="string" table:style-name="ce2">
            <text:p>Proveedor</text:p>
          </table:table-cell>
          <table:table-cell office:value-type="string" table:style-name="ce2">
            <text:p>ID de país de origen</text:p>
          </table:table-cell>
          <table:table-cell office:value-type="string" table:style-name="ce2">
            <text:p>Artículo</text:p>
          </table:table-cell>
          <table:table-cell office:value-type="string" table:style-name="ce2">
            <text:p>Tipo de cambio de costo</text:p>
          </table:table-cell>
          <table:table-cell office:value-type="string" table:style-name="ce2">
            <text:p>Valor de cambio de costo</text:p>
          </table:table-cell>
          <table:table-cell office:value-type="string" table:style-name="ce2">
            <text:p>Recálculo de órdenes</text:p>
          </table:table-cell>
          <table:table-cell office:value-type="string" table:style-name="ce2">
            <text:p>ID de país de entrega</text:p>
          </table:table-cell>
          <table:table-cell table:number-columns-repeated="16375"/>
        </table:table-row>
        <table:table-row table:number-rows-repeated="1001" table:style-name="ro2">
          <table:table-cell table:content-validation-name="val4" table:style-name="ce4"/>
          <table:table-cell table:number-columns-repeated="4" table:style-name="ce4"/>
          <table:table-cell table:content-validation-name="val5" table:style-name="ce4"/>
          <table:table-cell table:style-name="ce4"/>
          <table:table-cell table:content-validation-name="val6" table:style-name="ce4"/>
          <table:table-cell table:style-name="ce4"/>
          <table:table-cell table:number-columns-repeated="16375"/>
        </table:table-row>
        <table:table-row table:number-rows-repeated="1047574" table:style-name="ro3">
          <table:table-cell table:number-columns-repeated="16384"/>
        </table:table-row>
      </table:table>
      <table:table table:name="Ubicaciones_de_cambio_de_costo" table:style-name="ta2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7" table:number-columns-repeated="16373" table:default-cell-style-name="ce1"/>
        <table:table-row table:style-name="ro1">
          <table:table-cell office:value-type="string" table:style-name="ce2">
            <text:p>Acción</text:p>
          </table:table-cell>
          <table:table-cell office:value-type="string" table:style-name="ce2">
            <text:p>Cambio de costo</text:p>
          </table:table-cell>
          <table:table-cell office:value-type="string" table:style-name="ce2">
            <text:p>Proveedor</text:p>
          </table:table-cell>
          <table:table-cell office:value-type="string" table:style-name="ce2">
            <text:p>ID de país de origen</text:p>
          </table:table-cell>
          <table:table-cell office:value-type="string" table:style-name="ce2">
            <text:p>Artículo</text:p>
          </table:table-cell>
          <table:table-cell office:value-type="string" table:style-name="ce2">
            <text:p>Tipo de ubicación</text:p>
          </table:table-cell>
          <table:table-cell office:value-type="string" table:style-name="ce2">
            <text:p>Ubicación</text:p>
          </table:table-cell>
          <table:table-cell office:value-type="string" table:style-name="ce2">
            <text:p>Tipo de cambio de costo</text:p>
          </table:table-cell>
          <table:table-cell office:value-type="string" table:style-name="ce2">
            <text:p>Valor de cambio de costo</text:p>
          </table:table-cell>
          <table:table-cell office:value-type="string" table:style-name="ce2">
            <text:p>Recálculo de órdenes</text:p>
          </table:table-cell>
          <table:table-cell office:value-type="string" table:style-name="ce2">
            <text:p>ID de país de entrega</text:p>
          </table:table-cell>
          <table:table-cell table:number-columns-repeated="16373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3819" table:style-name="ce4">
            <text:p>3819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01" table:style-name="ce4">
            <text:p>101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 table:style-name="ce1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3819" table:style-name="ce4">
            <text:p>3819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02" table:style-name="ce4">
            <text:p>102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 table:style-name="ce1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3819" table:style-name="ce4">
            <text:p>3819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03" table:style-name="ce4">
            <text:p>103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 table:style-name="ce1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3819" table:style-name="ce4">
            <text:p>3819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04" table:style-name="ce4">
            <text:p>104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 table:style-name="ce1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3819" table:style-name="ce4">
            <text:p>3819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07" table:style-name="ce4">
            <text:p>107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 table:style-name="ce1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3819" table:style-name="ce4">
            <text:p>3819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08" table:style-name="ce4">
            <text:p>108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 table:style-name="ce1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10937" table:style-name="ce4">
            <text:p>10937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11" table:style-name="ce4">
            <text:p>111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 table:style-name="ce1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3819" table:style-name="ce4">
            <text:p>3819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15" table:style-name="ce4">
            <text:p>115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 table:style-name="ce1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1212" table:style-name="ce4">
            <text:p>1212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17" table:style-name="ce4">
            <text:p>117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 table:style-name="ce1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10225" table:style-name="ce4">
            <text:p>10225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19" table:style-name="ce4">
            <text:p>119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 table:style-name="ce1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1010" table:style-name="ce4">
            <text:p>1010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20" table:style-name="ce4">
            <text:p>120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 table:style-name="ce1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1208" table:style-name="ce4">
            <text:p>1208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21" table:style-name="ce4">
            <text:p>121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 table:style-name="ce1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3783" table:style-name="ce4">
            <text:p>3783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22" table:style-name="ce4">
            <text:p>122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 table:style-name="ce1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1218" table:style-name="ce4">
            <text:p>1218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24" table:style-name="ce4">
            <text:p>124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 table:style-name="ce1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7941" table:style-name="ce4">
            <text:p>7941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25" table:style-name="ce4">
            <text:p>125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 table:style-name="ce1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2679" table:style-name="ce4">
            <text:p>2679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26" table:style-name="ce4">
            <text:p>126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4687" table:style-name="ce4">
            <text:p>4687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27" table:style-name="ce4">
            <text:p>127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2463" table:style-name="ce4">
            <text:p>2463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31" table:style-name="ce4">
            <text:p>131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1234" table:style-name="ce4">
            <text:p>1234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32" table:style-name="ce4">
            <text:p>132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1212" table:style-name="ce4">
            <text:p>1212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34" table:style-name="ce4">
            <text:p>134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4051" table:style-name="ce4">
            <text:p>4051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39" table:style-name="ce4">
            <text:p>139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1234" table:style-name="ce4">
            <text:p>1234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40" table:style-name="ce4">
            <text:p>140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3819" table:style-name="ce4">
            <text:p>3819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41" table:style-name="ce4">
            <text:p>141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10203" table:style-name="ce4">
            <text:p>10203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43" table:style-name="ce4">
            <text:p>143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2305" table:style-name="ce4">
            <text:p>2305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44" table:style-name="ce4">
            <text:p>144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4339" table:style-name="ce4">
            <text:p>4339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45" table:style-name="ce4">
            <text:p>145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1293898" table:style-name="ce4">
            <text:p>1293898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46" table:style-name="ce4">
            <text:p>146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5937" table:style-name="ce4">
            <text:p>5937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47" table:style-name="ce4">
            <text:p>147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5133" table:style-name="ce4">
            <text:p>5133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48" table:style-name="ce4">
            <text:p>148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1218" table:style-name="ce4">
            <text:p>1218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49" table:style-name="ce4">
            <text:p>149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2463" table:style-name="ce4">
            <text:p>2463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50" table:style-name="ce4">
            <text:p>150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2463" table:style-name="ce4">
            <text:p>2463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51" table:style-name="ce4">
            <text:p>151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1713905" table:style-name="ce4">
            <text:p>1713905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52" table:style-name="ce4">
            <text:p>152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2463" table:style-name="ce4">
            <text:p>2463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53" table:style-name="ce4">
            <text:p>153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4051" table:style-name="ce4">
            <text:p>4051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55" table:style-name="ce4">
            <text:p>155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10937" table:style-name="ce4">
            <text:p>10937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56" table:style-name="ce4">
            <text:p>156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3819" table:style-name="ce4">
            <text:p>3819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57" table:style-name="ce4">
            <text:p>157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8171" table:style-name="ce4">
            <text:p>8171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58" table:style-name="ce4">
            <text:p>158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8171" table:style-name="ce4">
            <text:p>8171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59" table:style-name="ce4">
            <text:p>159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8171" table:style-name="ce4">
            <text:p>8171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60" table:style-name="ce4">
            <text:p>160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8171" table:style-name="ce4">
            <text:p>8171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61" table:style-name="ce4">
            <text:p>161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8171" table:style-name="ce4">
            <text:p>8171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62" table:style-name="ce4">
            <text:p>162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1218" table:style-name="ce4">
            <text:p>1218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63" table:style-name="ce4">
            <text:p>163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8495" table:style-name="ce4">
            <text:p>8495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64" table:style-name="ce4">
            <text:p>164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998898" table:style-name="ce4">
            <text:p>998898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65" table:style-name="ce4">
            <text:p>165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1010" table:style-name="ce4">
            <text:p>1010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66" table:style-name="ce4">
            <text:p>166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1218" table:style-name="ce4">
            <text:p>1218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67" table:style-name="ce4">
            <text:p>167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10225" table:style-name="ce4">
            <text:p>10225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73" table:style-name="ce4">
            <text:p>173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8821" table:style-name="ce4">
            <text:p>8821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98" table:style-name="ce4">
            <text:p>198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5133" table:style-name="ce4">
            <text:p>5133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301" table:style-name="ce4">
            <text:p>301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8821" table:style-name="ce4">
            <text:p>8821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302" table:style-name="ce4">
            <text:p>302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8821" table:style-name="ce4">
            <text:p>8821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304" table:style-name="ce4">
            <text:p>304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8821" table:style-name="ce4">
            <text:p>8821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305" table:style-name="ce4">
            <text:p>305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8821" table:style-name="ce4">
            <text:p>8821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306" table:style-name="ce4">
            <text:p>306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8821" table:style-name="ce4">
            <text:p>8821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307" table:style-name="ce4">
            <text:p>307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8821" table:style-name="ce4">
            <text:p>8821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308" table:style-name="ce4">
            <text:p>308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8821" table:style-name="ce4">
            <text:p>8821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309" table:style-name="ce4">
            <text:p>309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8821" table:style-name="ce4">
            <text:p>8821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310" table:style-name="ce4">
            <text:p>310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8821" table:style-name="ce4">
            <text:p>8821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311" table:style-name="ce4">
            <text:p>311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8821" table:style-name="ce4">
            <text:p>8821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312" table:style-name="ce4">
            <text:p>312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8821" table:style-name="ce4">
            <text:p>8821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313" table:style-name="ce4">
            <text:p>313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8821" table:style-name="ce4">
            <text:p>8821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314" table:style-name="ce4">
            <text:p>314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2497" table:style-name="ce4">
            <text:p>2497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315" table:style-name="ce4">
            <text:p>315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10937" table:style-name="ce4">
            <text:p>10937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316" table:style-name="ce4">
            <text:p>316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7941" table:style-name="ce4">
            <text:p>7941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317" table:style-name="ce4">
            <text:p>317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8821" table:style-name="ce4">
            <text:p>8821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318" table:style-name="ce4">
            <text:p>318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8585" table:style-name="ce4">
            <text:p>8585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319" table:style-name="ce4">
            <text:p>319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8821" table:style-name="ce4">
            <text:p>8821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320" table:style-name="ce4">
            <text:p>320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8821" table:style-name="ce4">
            <text:p>8821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321" table:style-name="ce4">
            <text:p>321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908900" table:style-name="ce4">
            <text:p>908900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322" table:style-name="ce4">
            <text:p>322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8403" table:style-name="ce4">
            <text:p>8403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323" table:style-name="ce4">
            <text:p>323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1218" table:style-name="ce4">
            <text:p>1218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324" table:style-name="ce4">
            <text:p>324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8683" table:style-name="ce4">
            <text:p>8683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325" table:style-name="ce4">
            <text:p>325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8821" table:style-name="ce4">
            <text:p>8821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326" table:style-name="ce4">
            <text:p>326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8939" table:style-name="ce4">
            <text:p>8939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327" table:style-name="ce4">
            <text:p>327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1218" table:style-name="ce4">
            <text:p>1218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328" table:style-name="ce4">
            <text:p>328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8495" table:style-name="ce4">
            <text:p>8495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329" table:style-name="ce4">
            <text:p>329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8585" table:style-name="ce4">
            <text:p>8585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330" table:style-name="ce4">
            <text:p>330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2679" table:style-name="ce4">
            <text:p>2679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331" table:style-name="ce4">
            <text:p>331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2679" table:style-name="ce4">
            <text:p>2679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332" table:style-name="ce4">
            <text:p>332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2679" table:style-name="ce4">
            <text:p>2679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333" table:style-name="ce4">
            <text:p>333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4339" table:style-name="ce4">
            <text:p>4339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335" table:style-name="ce4">
            <text:p>335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8939" table:style-name="ce4">
            <text:p>8939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401" table:style-name="ce4">
            <text:p>401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8811" table:style-name="ce4">
            <text:p>8811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403" table:style-name="ce4">
            <text:p>403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15780" table:style-name="ce4">
            <text:p>15780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405" table:style-name="ce4">
            <text:p>405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8939" table:style-name="ce4">
            <text:p>8939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406" table:style-name="ce4">
            <text:p>406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8867" table:style-name="ce4">
            <text:p>8867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410" table:style-name="ce4">
            <text:p>410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8495" table:style-name="ce4">
            <text:p>8495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411" table:style-name="ce4">
            <text:p>411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8495" table:style-name="ce4">
            <text:p>8495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412" table:style-name="ce4">
            <text:p>412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8683" table:style-name="ce4">
            <text:p>8683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417" table:style-name="ce4">
            <text:p>417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8939" table:style-name="ce4">
            <text:p>8939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418" table:style-name="ce4">
            <text:p>418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15780" table:style-name="ce4">
            <text:p>15780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419" table:style-name="ce4">
            <text:p>419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8821" table:style-name="ce4">
            <text:p>8821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617" table:style-name="ce4">
            <text:p>617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2003900" table:style-name="ce4">
            <text:p>2003900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420" table:style-name="ce4">
            <text:p>420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6" table:style-name="ce4">
            <text:p>56556</text:p>
          </table:table-cell>
          <table:table-cell office:value-type="float" office:value="2018900" table:style-name="ce4">
            <text:p>2018900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22" table:style-name="ce4">
            <text:p>122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5.119999999999997" table:style-name="ce4">
            <text:p>35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7" table:style-name="ce4">
            <text:p>56557</text:p>
          </table:table-cell>
          <table:table-cell office:value-type="float" office:value="2018900" table:style-name="ce4">
            <text:p>2018900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334" table:style-name="ce4">
            <text:p>334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6.119999999999997" table:style-name="ce4">
            <text:p>36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8" table:style-name="ce4">
            <text:p>56558</text:p>
          </table:table-cell>
          <table:table-cell office:value-type="float" office:value="1234" table:style-name="ce4">
            <text:p>1234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397" table:style-name="ce4">
            <text:p>397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7.119999999999997" table:style-name="ce4">
            <text:p>37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1234" table:style-name="ce4">
            <text:p>1234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Tienda</text:p>
          </table:table-cell>
          <table:table-cell office:value-type="float" office:value="168" table:style-name="ce4">
            <text:p>168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style-name="ro2" table:visibility="filter">
          <table:table-cell office:value-type="string" table:content-validation-name="val9" table:style-name="ce4">
            <text:p>Crear</text:p>
          </table:table-cell>
          <table:table-cell office:value-type="float" office:value="56555" table:style-name="ce4">
            <text:p>56555</text:p>
          </table:table-cell>
          <table:table-cell office:value-type="float" office:value="1720" table:style-name="ce4">
            <text:p>1720</text:p>
          </table:table-cell>
          <table:table-cell office:value-type="string" table:style-name="ce4">
            <text:p>UY</text:p>
          </table:table-cell>
          <table:table-cell table:style-name="ce4"/>
          <table:table-cell office:value-type="string" table:content-validation-name="val7" table:style-name="ce4">
            <text:p>Almacén</text:p>
          </table:table-cell>
          <table:table-cell office:value-type="float" office:value="100" table:style-name="ce4">
            <text:p>100</text:p>
          </table:table-cell>
          <table:table-cell office:value-type="string" table:content-validation-name="val10" table:style-name="ce4">
            <text:p>Costo fijo</text:p>
          </table:table-cell>
          <table:table-cell office:value-type="float" office:value="34.119999999999997" table:style-name="ce4">
            <text:p>34,12</text:p>
          </table:table-cell>
          <table:table-cell office:value-type="string" table:content-validation-name="val8" table:style-name="ce4">
            <text:p>No</text:p>
          </table:table-cell>
          <table:table-cell table:number-columns-repeated="16374"/>
        </table:table-row>
        <table:table-row table:number-rows-repeated="644" table:style-name="ro2" table:visibility="filter">
          <table:table-cell table:content-validation-name="val9" table:style-name="ce4"/>
          <table:table-cell table:number-columns-repeated="4" table:style-name="ce4"/>
          <table:table-cell table:content-validation-name="val7" table:style-name="ce4"/>
          <table:table-cell table:style-name="ce4"/>
          <table:table-cell table:content-validation-name="val10" table:style-name="ce4"/>
          <table:table-cell table:style-name="ce4"/>
          <table:table-cell table:content-validation-name="val8" table:style-name="ce4"/>
          <table:table-cell table:number-columns-repeated="16374"/>
        </table:table-row>
        <table:table-row table:number-rows-repeated="571" table:style-name="ro2" table:visibility="filter">
          <table:table-cell table:content-validation-name="val9" table:style-name="ce4"/>
          <table:table-cell table:number-columns-repeated="4" table:style-name="ce4"/>
          <table:table-cell table:content-validation-name="val7" table:style-name="ce4"/>
          <table:table-cell table:style-name="ce4"/>
          <table:table-cell table:content-validation-name="val10" table:style-name="ce8"/>
          <table:table-cell table:style-name="ce4"/>
          <table:table-cell table:content-validation-name="val8" table:style-name="ce9"/>
          <table:table-cell table:number-columns-repeated="16374"/>
        </table:table-row>
        <table:table-row table:number-rows-repeated="1047261" table:style-name="ro3">
          <table:table-cell table:number-columns-repeated="16384"/>
        </table:table-row>
      </table:table>
      <table:table table:name="Cond_Pago_de_Cambios_Costo" table:style-name="ta1">
        <table:table-column table:style-name="co13" table:default-cell-style-name="ce1"/>
        <table:table-column table:style-name="co14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2">
            <text:p>Cambio de Costo</text:p>
          </table:table-cell>
          <table:table-cell office:value-type="string" table:style-name="ce2">
            <text:p>Condiciones de Pago</text:p>
          </table:table-cell>
          <table:table-cell table:number-columns-repeated="16382"/>
        </table:table-row>
        <table:table-row table:style-name="ro2">
          <table:table-cell table:number-columns-repeated="16384" table:style-name="ce1"/>
        </table:table-row>
        <table:table-row table:number-rows-repeated="1048574" table:style-name="ro3">
          <table:table-cell table:number-columns-repeated="16384"/>
        </table:table-row>
      </table:table>
      <table:database-ranges>
        <table:database-range table:target-range-address="Ubicaciones_de_cambio_de_costo.A1:Ubicaciones_de_cambio_de_costo.K1315" table:display-filter-buttons="true">
          <table:filter>
            <table:filter-condition table:field-number="6" table:value="153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textual="true"/>
      <number:text>-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meta:initial-creator>user user</meta:initial-creator>
    <dc:creator>Dasimar Figueroa</dc:creator>
    <meta:creation-date>2014-08-11T02:22:20Z</meta:creation-date>
    <dc:date>2025-06-16T18:49:39Z</dc:date>
    <meta:editing-cycles>3</meta:editing-cycles>
    <meta:editing-duration>PT147S</meta:editing-duration>
  </office:meta>
</office:document-meta>
</file>